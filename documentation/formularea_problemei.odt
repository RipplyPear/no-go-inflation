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6.501cm" table:align="margins"/>
    </style:style>
    <style:style style:name="Table1.A" style:family="table-column">
      <style:table-column-properties style:column-width="4.586cm" style:rel-column-width="18213*"/>
    </style:style>
    <style:style style:name="Table1.B" style:family="table-column">
      <style:table-column-properties style:column-width="3.664cm" style:rel-column-width="14550*"/>
    </style:style>
    <style:style style:name="Table1.C" style:family="table-column">
      <style:table-column-properties style:column-width="4.126cm" style:rel-column-width="16385*"/>
    </style:style>
    <style:style style:name="Table1.D" style:family="table-column">
      <style:table-column-properties style:column-width="4.126cm" style:rel-column-width="16387*"/>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0e7d9" officeooo:paragraph-rsid="001e8a5d"/>
    </style:style>
    <style:style style:name="P2" style:family="paragraph" style:parent-style-name="Heading_20_1">
      <style:text-properties officeooo:rsid="0010e7d9" officeooo:paragraph-rsid="001e8a5d"/>
    </style:style>
    <style:style style:name="P3" style:family="paragraph" style:parent-style-name="Text_20_body">
      <style:paragraph-properties fo:line-height="115%"/>
      <style:text-properties officeooo:paragraph-rsid="001e8a5d"/>
    </style:style>
    <style:style style:name="P4" style:family="paragraph" style:parent-style-name="Text_20_body">
      <style:text-properties officeooo:paragraph-rsid="001e8a5d"/>
    </style:style>
    <style:style style:name="P5" style:family="paragraph" style:parent-style-name="Heading_20_1">
      <style:text-properties officeooo:rsid="0011bf78" officeooo:paragraph-rsid="001e8a5d"/>
    </style:style>
    <style:style style:name="P6" style:family="paragraph" style:parent-style-name="Text_20_body" style:list-style-name="L1">
      <style:paragraph-properties fo:margin-left="0cm" fo:margin-top="0cm" fo:margin-bottom="0.247cm" style:contextual-spacing="false" fo:text-indent="1cm" style:auto-text-indent="false"/>
      <style:text-properties officeooo:paragraph-rsid="001e8a5d"/>
    </style:style>
    <style:style style:name="P7" style:family="paragraph" style:parent-style-name="Text_20_body" style:list-style-name="L1">
      <style:paragraph-properties fo:margin-left="0cm" fo:margin-top="0cm" fo:margin-bottom="0.247cm" style:contextual-spacing="false" fo:text-indent="1cm" style:auto-text-indent="false"/>
      <style:text-properties officeooo:rsid="0013aad4" officeooo:paragraph-rsid="001e8a5d"/>
    </style:style>
    <style:style style:name="P8" style:family="paragraph" style:parent-style-name="Text_20_body" style:list-style-name="L1">
      <style:paragraph-properties fo:margin-left="0cm" fo:margin-top="0cm" fo:margin-bottom="0.247cm" style:contextual-spacing="false" fo:text-indent="1cm" style:auto-text-indent="false"/>
      <style:text-properties officeooo:rsid="00141f94" officeooo:paragraph-rsid="001e8a5d"/>
    </style:style>
    <style:style style:name="P9" style:family="paragraph" style:parent-style-name="Heading_20_1">
      <style:text-properties officeooo:rsid="00141f94" officeooo:paragraph-rsid="001e8a5d"/>
    </style:style>
    <style:style style:name="P10" style:family="paragraph" style:parent-style-name="Text_20_body">
      <style:text-properties officeooo:rsid="00159fda" officeooo:paragraph-rsid="001e8a5d"/>
    </style:style>
    <style:style style:name="P11" style:family="paragraph" style:parent-style-name="Text_20_body">
      <style:paragraph-properties fo:margin-left="0cm" fo:text-indent="0cm" style:auto-text-indent="false"/>
      <style:text-properties officeooo:rsid="00159fda" officeooo:paragraph-rsid="001e8a5d"/>
    </style:style>
    <style:style style:name="P12" style:family="paragraph" style:parent-style-name="Text_20_body" style:list-style-name="L2"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0211ba8" officeooo:paragraph-rsid="00211ba8"/>
    </style:style>
    <style:style style:name="P13"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211ba8" officeooo:paragraph-rsid="00211ba8"/>
    </style:style>
    <style:style style:name="P14" style:family="paragraph" style:parent-style-name="Text_20_body" style:list-style-name="L2">
      <loext:graphic-properties draw:fill="none"/>
      <style:paragraph-properties fo:margin-top="0cm" fo:margin-bottom="0.247cm" style:contextual-spacing="false" fo:line-height="150%" fo:text-align="justify" style:justify-single-word="false" fo:background-color="transparent"/>
      <style:text-properties officeooo:rsid="00211ba8" officeooo:paragraph-rsid="00211ba8"/>
    </style:style>
    <style:style style:name="P15" style:family="paragraph" style:parent-style-name="Text_20_body" style:list-style-name="L2">
      <loext:graphic-properties draw:fill="none"/>
      <style:paragraph-properties fo:margin-top="0cm" fo:margin-bottom="0.247cm" style:contextual-spacing="false" fo:line-height="150%" fo:text-align="justify" style:justify-single-word="false" fo:background-color="transparent"/>
      <style:text-properties officeooo:rsid="0022e2d2" officeooo:paragraph-rsid="0022e2d2"/>
    </style:style>
    <style:style style:name="P16" style:family="paragraph" style:parent-style-name="Heading_20_2">
      <style:text-properties officeooo:rsid="001f8b9a"/>
    </style:style>
    <style:style style:name="P17" style:family="paragraph" style:parent-style-name="Text_20_body">
      <style:text-properties officeooo:paragraph-rsid="0022e2d2"/>
    </style:style>
    <style:style style:name="P18" style:family="paragraph" style:parent-style-name="Text_20_body" style:list-style-name="L3">
      <style:text-properties officeooo:rsid="0022e2d2" officeooo:paragraph-rsid="0022e2d2"/>
    </style:style>
    <style:style style:name="P19" style:family="paragraph" style:parent-style-name="Text_20_body" style:list-style-name="L4">
      <style:text-properties officeooo:rsid="0024da3d" officeooo:paragraph-rsid="0024da3d"/>
    </style:style>
    <style:style style:name="P20" style:family="paragraph" style:parent-style-name="Heading_20_2">
      <style:text-properties officeooo:rsid="0024da3d" officeooo:paragraph-rsid="0024da3d"/>
    </style:style>
    <style:style style:name="P21" style:family="paragraph" style:parent-style-name="Table_20_Contents">
      <style:paragraph-properties fo:text-align="justify" style:justify-single-word="false"/>
      <style:text-properties style:font-name="Times New Roman1" officeooo:rsid="0024da3d" officeooo:paragraph-rsid="0024da3d"/>
    </style:style>
    <style:style style:name="P22" style:family="paragraph" style:parent-style-name="Table_20_Contents">
      <style:paragraph-properties fo:text-align="justify" style:justify-single-word="false"/>
      <style:text-properties style:font-name="Times New Roman1"/>
    </style:style>
    <style:style style:name="P23" style:family="paragraph" style:parent-style-name="Table_20_Contents">
      <style:paragraph-properties fo:text-align="justify" style:justify-single-word="false"/>
      <style:text-properties style:font-name="Times New Roman1" officeooo:rsid="002547e4" officeooo:paragraph-rsid="002547e4"/>
    </style:style>
    <style:style style:name="P24" style:family="paragraph" style:parent-style-name="Text_20_body">
      <style:paragraph-properties fo:margin-left="0cm" fo:text-indent="0cm" style:auto-text-indent="false"/>
      <style:text-properties officeooo:paragraph-rsid="0024da3d"/>
    </style:style>
    <style:style style:name="P25" style:family="paragraph" style:parent-style-name="Heading_20_1">
      <style:paragraph-properties fo:margin-left="0cm" fo:margin-top="0cm" fo:margin-bottom="0.247cm" style:contextual-spacing="false" fo:line-height="115%" fo:text-align="justify" style:justify-single-word="false" fo:text-indent="0cm" style:auto-text-indent="false"/>
      <style:text-properties style:font-name="Times New Roman1"/>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Heading_20_1">
      <style:paragraph-properties fo:margin-left="0cm" fo:margin-top="0cm" fo:margin-bottom="0.247cm" style:contextual-spacing="false" fo:line-height="115%" fo:text-align="justify" style:justify-single-word="false" fo:text-indent="0cm" style:auto-text-indent="false"/>
    </style:style>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T1" style:family="text">
      <style:text-properties officeooo:rsid="0010e7d9"/>
    </style:style>
    <style:style style:name="T2" style:family="text">
      <style:text-properties officeooo:rsid="0011bf78"/>
    </style:style>
    <style:style style:name="T3" style:family="text">
      <style:text-properties officeooo:rsid="00168941"/>
    </style:style>
    <style:style style:name="T4" style:family="text">
      <style:text-properties officeooo:rsid="0013aad4"/>
    </style:style>
    <style:style style:name="T5" style:family="text">
      <style:text-properties officeooo:rsid="001e8a5d"/>
    </style:style>
    <style:style style:name="T6" style:family="text">
      <style:text-properties officeooo:rsid="00141f94"/>
    </style:style>
    <style:style style:name="T7" style:family="text">
      <style:text-properties officeooo:rsid="0015cd26"/>
    </style:style>
    <style:style style:name="T8" style:family="text">
      <style:text-properties officeooo:rsid="00211ba8"/>
    </style:style>
    <style:style style:name="T9" style:family="text">
      <style:text-properties officeooo:rsid="0022e2d2"/>
    </style:style>
    <style:style style:name="T10" style:family="text">
      <style:text-properties officeooo:rsid="001f9b27"/>
    </style:style>
    <style:style style:name="T11" style:family="text">
      <style:text-properties officeooo:rsid="0024da3d"/>
    </style:style>
    <style:style style:name="T12" style:family="text">
      <style:text-properties officeooo:rsid="002af2a2"/>
    </style:style>
    <style:style style:name="T13" style:family="text">
      <style:text-properties fo:font-weight="normal" style:font-weight-asian="normal" style:font-weight-complex="normal"/>
    </style:style>
    <style:style style:name="T14" style:family="text">
      <style:text-properties fo:font-weight="normal" officeooo:rsid="002b734a" style:font-weight-asian="normal" style:font-weight-complex="normal"/>
    </style:style>
    <style:style style:name="T15" style:family="text">
      <style:text-properties officeooo:rsid="002b734a"/>
    </style:style>
    <style:style style:name="T16" style:family="text">
      <style:text-properties officeooo:rsid="002c5601"/>
    </style:style>
    <style:style style:name="T17" style:family="text">
      <style:text-properties style:font-name="Times New Roman1" officeooo:rsid="002c5601"/>
    </style:style>
    <style:style style:name="T18" style:family="text">
      <style:text-properties style:font-name="Times New Roman1"/>
    </style:style>
    <style:style style:name="T19" style:family="text">
      <style:text-properties officeooo:rsid="002df0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ea problemei</text:p>
      <text:h text:style-name="P2" text:outline-level="1">1. Introducere</text:h>
      <text:p text:style-name="P3"><text:tab/><text:span text:style-name="T1">Prezentul document urmărește definirea publicului-țintă </text:span><text:span text:style-name="T2">și a actorilor unei aplicații software</text:span><text:span text:style-name="T1">. </text:span><text:span text:style-name="T2">Aplicația analizată este un joc video 2D realizat în Godot. Acesta este multiplayer </text:span><text:span text:style-name="T3">și</text:span><text:span text:style-name="T2"> colaborativ, bazat pe un model economic dinamic. Jucătorii controlează economii locale ce alcătuiesc un ecosistem economic global al cărui echilibru este influențat de decizii individuale. Scopul jocului este menținerea echilibrului prin lucru în echipă.</text:span></text:p>
      <text:p text:style-name="P4"><text:tab/>Documentul își propune să ofere o imagine de ansamblu asupra modului în care diferitele tipuri de utilizatori interacționează cu platforma, precum și asupra responsabilităților, limitărilor și permisiunilor atribuite fiecăruia. Această definire reprezintă o componentă centrală în proiectarea sistem<text:span text:style-name="T2">ului</text:span> multi-utilizator, asigur<text:span text:style-name="T2">ând</text:span> compatibilitatea dintre cerințe, arhitectura tehnică și experiența utilizatorilor. </text:p>
      <text:h text:style-name="P5" text:outline-level="1">2. Publicul-țintă</text:h>
      <text:p text:style-name="P4"><text:tab/><text:span text:style-name="T4">Aplicația urmărește o audiență diversă, atât </text:span><text:span text:style-name="T5">din</text:span><text:span text:style-name="T4"> sfera de gaming, cât și </text:span><text:span text:style-name="T5">din</text:span><text:span text:style-name="T4"> mediul academic. Principalele categorii de utilizatori sunt:</text:span></text:p>
      <text:list text:style-name="L1">
        <text:list-item>
          <text:p text:style-name="P6"><text:span text:style-name="T4">Jucători interesați de jocuri de strategie. Aceștia reprezintă segmentul principal de audiență. </text:span>Sunt utilizatori care apreciază jocuri de strategie economică, management de resurse și simulări în timp real. <text:span text:style-name="T4">Aceștia</text:span> caută o experiență interactivă, accesibilă și satisfăcătoare, fără a necesita o curbă de învățare foarte abruptă. </text:p>
        </text:list-item>
        <text:list-item>
          <text:p text:style-name="P7">Studenți și p<text:span text:style-name="T6">rofesori din domeniul</text:span> economic. Aplicația urmărește simularea unor concepte economice elementare, precum cererea, oferta și inflația, într-un mod vizual și interactiv. Aceasta are, astfel, un potențial ridicat <text:span text:style-name="T6">pentru</text:span> a fi o unealtă educativă.</text:p>
        </text:list-item>
        <text:list-item>
          <text:p text:style-name="P8">Jucători interesați de jocuri colaborative. Componenta multiplayer în timp real și prezența unui obiectiv comun pentru jucători face aplicația atractivă pentru comunitățile pasionate de jocuri ce implică cooperarea și lucrul în echipă. Prin acest aspect, aplicația prezintă potențial de interes inclusiv pentru amatorii de jocuri de masă.</text:p>
        </text:list-item>
      </text:list>
      <text:h text:style-name="P9" text:outline-level="1">3. Actorii sistemului</text:h>
      <text:p text:style-name="P10">Sistemul urmărește trei actori principali, fiecare având roluri <text:span text:style-name="T7">și permisiuni proprii</text:span>.</text:p>
      <text:h text:style-name="Heading_20_2" text:outline-level="2"><text:span text:style-name="T5">3.1. </text:span>Jucător</text:h>
      <text:p text:style-name="P11"><text:tab/>A<text:span text:style-name="T5">cesta este a</text:span>ctorul principal al sistemului. Controlează o economie individuală într-o sesiune multiplayer și poate <text:span text:style-name="T8">întreprinde următoarele acțiuni</text:span>:</text:p>
      <text:list text:style-name="L2">
        <text:list-item>
          <text:p text:style-name="P12">Autentificare / login</text:p>
        </text:list-item>
        <text:list-item>
          <text:p text:style-name="P13">Intrarea într-o sesiune de joc, prin matchmaking sau <text:span text:style-name="T9">prin</text:span> crearea propriului lobby</text:p>
        </text:list-item>
        <text:list-item>
          <text:p text:style-name="P14"><text:soft-page-break/>Gestionarea economiei proprii, prin construirea / îmbunătățirea facilităților de producție și <text:span text:style-name="T9">prin</text:span> optimizarea producției și a vânzării</text:p>
        </text:list-item>
        <text:list-item>
          <text:p text:style-name="P14">Comerț, prin crearea de oferte și acceptarea / refuzul ofertelor altor jucătorilor</text:p>
        </text:list-item>
        <text:list-item>
          <text:p text:style-name="P14">Monitorizarea indicatorilor economici: inflație, cerere și ofertă</text:p>
        </text:list-item>
        <text:list-item>
          <text:p text:style-name="P15">Comunicarea cu ceilalți jucători prin chat</text:p>
        </text:list-item>
        <text:list-item>
          <text:p text:style-name="P15">Părăsirea sesiunii de joc</text:p>
        </text:list-item>
      </text:list>
      <text:h text:style-name="P16" text:outline-level="2">3.2. Jucător bot</text:h>
      <text:p text:style-name="P17">Actor software, controlat de server. <text:span text:style-name="T9">Acesta menține piața dinamică prin comerț cu alți boți, oferă jucătorului posibilitatea de a juca o sesiune „solo” și are implementate mecanisme care să prevină exploatarea sa. Activitățile pe care le poate întreprinde sunt:</text:span></text:p>
      <text:list text:style-name="L3">
        <text:list-item>
          <text:p text:style-name="P18">Producție limitată, artificială de resurse</text:p>
        </text:list-item>
        <text:list-item>
          <text:p text:style-name="P18">Comerț cu ceilalți jucători în mod controlat</text:p>
        </text:list-item>
        <text:list-item>
          <text:p text:style-name="P18">Evaluează gradul de încredere al celorlalți jucători pentru a nu fi exploatat de cei ce urmăresc destabilizarea economiei</text:p>
        </text:list-item>
      </text:list>
      <text:h text:style-name="Heading_20_2" text:outline-level="2"><text:span text:style-name="T10">3.3 </text:span>Sistemul <text:span text:style-name="T10">(Serverul)</text:span></text:h>
      <text:p text:style-name="Text_20_body">Actor tehnic ce <text:span text:style-name="T11">cu următoarele atribuții:</text:span></text:p>
      <text:list text:style-name="L4">
        <text:list-item>
          <text:p text:style-name="P19">Gestionarea logicii de joc, prin procesarea tick-urilor economice și prin calcularea și recalcularea indicatorilor economici</text:p>
        </text:list-item>
        <text:list-item>
          <text:p text:style-name="P19">Administrarea aspectelor multiplayer: conectarea și deconectarea jucătorilor, sincronizarea stărilor, gestionarea situaților de conexiune slabă</text:p>
        </text:list-item>
        <text:list-item>
          <text:p text:style-name="P19">Asigurarea persistenței datelor </text:p>
        </text:list-item>
        <text:list-item>
          <text:p text:style-name="P19">Gestionarea boților</text:p>
        </text:list-item>
      </text:list>
      <text:h text:style-name="P20" text:outline-level="2">3.4 Matricea permisiunil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Activitate / Actor</text:p>
          </table:table-cell>
          <table:table-cell table:style-name="Table1.A1" office:value-type="string">
            <text:p text:style-name="P21">Jucător</text:p>
          </table:table-cell>
          <table:table-cell table:style-name="Table1.A1" office:value-type="string">
            <text:p text:style-name="P21">Bot</text:p>
          </table:table-cell>
          <table:table-cell table:style-name="Table1.D1" office:value-type="string">
            <text:p text:style-name="P21">Server</text:p>
          </table:table-cell>
        </table:table-row>
        <table:table-row>
          <table:table-cell table:style-name="Table1.A2" office:value-type="string">
            <text:p text:style-name="P21">Autentificare</text:p>
          </table:table-cell>
          <table:table-cell table:style-name="Table1.A2" office:value-type="string">
            <text:p text:style-name="P21">Da</text:p>
          </table:table-cell>
          <table:table-cell table:style-name="Table1.A2" office:value-type="string">
            <text:p text:style-name="P22">-</text:p>
          </table:table-cell>
          <table:table-cell table:style-name="Table1.D2" office:value-type="string">
            <text:p text:style-name="P22">-</text:p>
          </table:table-cell>
        </table:table-row>
        <table:table-row>
          <table:table-cell table:style-name="Table1.A2" office:value-type="string">
            <text:p text:style-name="P21">Creare sesiune</text:p>
          </table:table-cell>
          <table:table-cell table:style-name="Table1.A2" office:value-type="string">
            <text:p text:style-name="P21">Da</text:p>
          </table:table-cell>
          <table:table-cell table:style-name="Table1.A2" office:value-type="string">
            <text:p text:style-name="P21">Nu</text:p>
          </table:table-cell>
          <table:table-cell table:style-name="Table1.D2" office:value-type="string">
            <text:p text:style-name="P21">Da</text:p>
          </table:table-cell>
        </table:table-row>
        <table:table-row>
          <table:table-cell table:style-name="Table1.A2" office:value-type="string">
            <text:p text:style-name="P21">Intrare în sesiune</text:p>
          </table:table-cell>
          <table:table-cell table:style-name="Table1.A2" office:value-type="string">
            <text:p text:style-name="P21">Da</text:p>
          </table:table-cell>
          <table:table-cell table:style-name="Table1.A2" office:value-type="string">
            <text:p text:style-name="P21">Da</text:p>
          </table:table-cell>
          <table:table-cell table:style-name="Table1.D2" office:value-type="string">
            <text:p text:style-name="P21">Da</text:p>
          </table:table-cell>
        </table:table-row>
        <table:table-row>
          <table:table-cell table:style-name="Table1.A2" office:value-type="string">
            <text:p text:style-name="P21">Producție resurse</text:p>
          </table:table-cell>
          <table:table-cell table:style-name="Table1.A2" office:value-type="string">
            <text:p text:style-name="P21">Da</text:p>
          </table:table-cell>
          <table:table-cell table:style-name="Table1.A2" office:value-type="string">
            <text:p text:style-name="P21">Da (limitat)</text:p>
          </table:table-cell>
          <table:table-cell table:style-name="Table1.D2" office:value-type="string">
            <text:p text:style-name="P21">Nu</text:p>
          </table:table-cell>
        </table:table-row>
        <table:table-row>
          <table:table-cell table:style-name="Table1.A2" office:value-type="string">
            <text:p text:style-name="P21">Comerț P2P</text:p>
          </table:table-cell>
          <table:table-cell table:style-name="Table1.A2" office:value-type="string">
            <text:p text:style-name="P21">Da</text:p>
          </table:table-cell>
          <table:table-cell table:style-name="Table1.A2" office:value-type="string">
            <text:p text:style-name="P21">Da (limitat)</text:p>
          </table:table-cell>
          <table:table-cell table:style-name="Table1.D2" office:value-type="string">
            <text:p text:style-name="P21">Nu</text:p>
          </table:table-cell>
        </table:table-row>
        <table:table-row>
          <table:table-cell table:style-name="Table1.A2" office:value-type="string">
            <text:p text:style-name="P21">Acces piață globală</text:p>
          </table:table-cell>
          <table:table-cell table:style-name="Table1.A2" office:value-type="string">
            <text:p text:style-name="P21">Da</text:p>
          </table:table-cell>
          <table:table-cell table:style-name="Table1.A2" office:value-type="string">
            <text:p text:style-name="P21">Da (limitat)</text:p>
          </table:table-cell>
          <table:table-cell table:style-name="Table1.D2" office:value-type="string">
            <text:p text:style-name="P21">Administare</text:p>
          </table:table-cell>
        </table:table-row>
        <table:table-row>
          <table:table-cell table:style-name="Table1.A2" office:value-type="string">
            <text:p text:style-name="P21">Activarea finalului „egoist”</text:p>
          </table:table-cell>
          <table:table-cell table:style-name="Table1.A2" office:value-type="string">
            <text:p text:style-name="P23">Da</text:p>
          </table:table-cell>
          <table:table-cell table:style-name="Table1.A2" office:value-type="string">
            <text:p text:style-name="P23">Nu</text:p>
          </table:table-cell>
          <table:table-cell table:style-name="Table1.D2" office:value-type="string">
            <text:p text:style-name="P23">Nu</text:p>
          </table:table-cell>
        </table:table-row>
        <table:table-row>
          <table:table-cell table:style-name="Table1.A2" office:value-type="string">
            <text:p text:style-name="P21">Vizualizare indicatori <text:soft-page-break/>economici</text:p>
          </table:table-cell>
          <table:table-cell table:style-name="Table1.A2" office:value-type="string">
            <text:p text:style-name="P23">Da</text:p>
          </table:table-cell>
          <table:table-cell table:style-name="Table1.A2" office:value-type="string">
            <text:p text:style-name="P23">Da</text:p>
          </table:table-cell>
          <table:table-cell table:style-name="Table1.D2" office:value-type="string">
            <text:p text:style-name="P23">Da</text:p>
          </table:table-cell>
        </table:table-row>
        <table:table-row>
          <table:table-cell table:style-name="Table1.A2" office:value-type="string">
            <text:p text:style-name="P21">Persistență a datelor</text:p>
          </table:table-cell>
          <table:table-cell table:style-name="Table1.A2" office:value-type="string">
            <text:p text:style-name="P23">Nu</text:p>
          </table:table-cell>
          <table:table-cell table:style-name="Table1.A2" office:value-type="string">
            <text:p text:style-name="P23">Nu</text:p>
          </table:table-cell>
          <table:table-cell table:style-name="Table1.D2" office:value-type="string">
            <text:p text:style-name="P23">Da</text:p>
          </table:table-cell>
        </table:table-row>
        <table:table-row>
          <table:table-cell table:style-name="Table1.A2" office:value-type="string">
            <text:p text:style-name="P21">Gestionare boți</text:p>
          </table:table-cell>
          <table:table-cell table:style-name="Table1.A2" office:value-type="string">
            <text:p text:style-name="P23">Nu</text:p>
          </table:table-cell>
          <table:table-cell table:style-name="Table1.A2" office:value-type="string">
            <text:p text:style-name="P22">-</text:p>
          </table:table-cell>
          <table:table-cell table:style-name="Table1.D2" office:value-type="string">
            <text:p text:style-name="P23">Da</text:p>
          </table:table-cell>
        </table:table-row>
      </table:table>
      <text:p text:style-name="P24"/>
      <text:h text:style-name="P25" text:outline-level="1"><text:span text:style-name="T12">4</text:span>. Cerințe de performanță și paralelism</text:h>
      <text:h text:style-name="Heading_20_2" text:outline-level="2"><text:span text:style-name="Strong_20_Emphasis"><text:span text:style-name="T12">4</text:span></text:span><text:span text:style-name="Strong_20_Emphasis">.1. Reacție în timp real</text:span></text:h>
      <text:p text:style-name="Text_20_body">Având în vedere că jocul funcționează cu tick-uri rapide și tranzacții economice multiple, aplicația trebuie să asigure:</text:p>
      <text:list text:style-name="L5">
        <text:list-item>
          <text:p text:style-name="P26">latență medie <text:span text:style-name="Strong_20_Emphasis"><text:span text:style-name="T13">sub 150 ms</text:span></text:span> între client și server</text:p>
        </text:list-item>
        <text:list-item>
          <text:p text:style-name="P26">rate stabile de actualizare a stării (broadcast WebSocket) la <text:span text:style-name="Strong_20_Emphasis"><text:span text:style-name="T13">10–20 actualizări pe secundă</text:span></text:span> (în funcție de încărcare)</text:p>
        </text:list-item>
        <text:list-item>
          <text:p text:style-name="P26">procesare server-side în maxim <text:span text:style-name="Strong_20_Emphasis"><text:span text:style-name="T13">50 ms per eveniment</text:span></text:span></text:p>
        </text:list-item>
      </text:list>
      <text:p text:style-name="Text_20_body">Frontendul Godot va procesa evenimentele în cadrul unui <text:span text:style-name="T12">loop</text:span>, iar backend-ul trebuie să țină pasul prin structurarea logicii într-un mod event-driven.</text:p>
      <text:h text:style-name="Heading_20_2" text:outline-level="2"><text:span text:style-name="Strong_20_Emphasis"><text:span text:style-name="T12">4</text:span></text:span><text:span text:style-name="Strong_20_Emphasis">.2. Paralelism</text:span></text:h>
      <text:p text:style-name="Text_20_body">Backend-ul implementat în Node.js trebuie să:</text:p>
      <text:list text:style-name="L6">
        <text:list-item>
          <text:p text:style-name="P27">gestioneze simultan <text:span text:style-name="T12">multiple</text:span><text:span text:style-name="Strong_20_Emphasis"><text:span text:style-name="T13"> conexiuni WebSocket active</text:span></text:span> în cadrul unei sesiuni</text:p>
        </text:list-item>
        <text:list-item>
          <text:p text:style-name="P27">proceseze în paralel tranzacțiile economice prin intermediul mecanismelor asincrone (Promises, event loop)</text:p>
        </text:list-item>
        <text:list-item>
          <text:p text:style-name="P27">evite blocările (non-blocking I/O)</text:p>
        </text:list-item>
      </text:list>
      <text:h text:style-name="Heading_20_2" text:outline-level="2" text:is-list-header="true"><text:span text:style-name="Strong_20_Emphasis"><text:span text:style-name="T12">4</text:span></text:span><text:span text:style-name="Strong_20_Emphasis">.3. Consistență în timp real</text:span></text:h>
      <text:p text:style-name="Text_20_body">Server-ul este autoritativ — deciziile economice se iau exclusiv la nivelul backend-ului.<text:line-break/>Cerința de consistență este de tip <text:span text:style-name="Strong_20_Emphasis"><text:span text:style-name="T13">„</text:span></text:span><text:span text:style-name="Strong_20_Emphasis"><text:span text:style-name="T14">consistență eventuală cu constrăngeri</text:span></text:span><text:span text:style-name="Strong_20_Emphasis"><text:span text:style-name="T13">”</text:span></text:span>:</text:p>
      <text:list text:style-name="L7">
        <text:list-item>
          <text:p text:style-name="P28">toate operațiunile critice (<text:span text:style-name="T12">comerț</text:span>, procesare resurse) trebuie să fie confirmate prin server</text:p>
        </text:list-item>
        <text:list-item>
          <text:p text:style-name="P28">stările afișate trebuie să reflecte la maximum 100–200 ms de la realitatea serverului</text:p>
        </text:list-item>
      </text:list>
      <text:h text:style-name="P25" text:outline-level="1"><text:span text:style-name="T15">5</text:span>. Cerințe de securitate</text:h>
      <text:h text:style-name="Heading_20_2" text:outline-level="2"><text:span text:style-name="Strong_20_Emphasis"><text:span text:style-name="T15">5</text:span></text:span><text:span text:style-name="Strong_20_Emphasis">.1. Autentificare</text:span></text:h>
      <text:list text:style-name="L8">
        <text:list-item>
          <text:p text:style-name="P29">autentificare prin JWT (JSON Web Token),</text:p>
        </text:list-item>
        <text:list-item>
          <text:p text:style-name="P29">expirare token,</text:p>
        </text:list-item>
        <text:list-item>
          <text:p text:style-name="P29">reîmprospătare token automat (refresh flow),</text:p>
        </text:list-item>
        <text:list-item>
          <text:p text:style-name="P29">validare strictă a identității jucătorilor.</text:p>
        </text:list-item>
      </text:list>
      <text:h text:style-name="Heading_20_2" text:outline-level="2" text:is-list-header="true"><text:soft-page-break/><text:span text:style-name="Strong_20_Emphasis"><text:span text:style-name="T16">5</text:span></text:span><text:span text:style-name="Strong_20_Emphasis">.2. Autorizare</text:span></text:h>
      <text:list text:style-name="L9">
        <text:list-item>
          <text:p text:style-name="P30">acces diferențiat în funcție de rol: Player, Bot, Server,</text:p>
        </text:list-item>
        <text:list-item>
          <text:p text:style-name="P30">verificare server-side a fiecărei acțiuni ce poate modifica state-ul economiei,</text:p>
        </text:list-item>
        <text:list-item>
          <text:p text:style-name="P30">prevenirea tranzacțiilor invalide sau a manipulării pieței prin mesaje falsificate.</text:p>
        </text:list-item>
      </text:list>
      <text:h text:style-name="Heading_20_2" text:outline-level="2" text:is-list-header="true"><text:span text:style-name="Strong_20_Emphasis"><text:span text:style-name="T16">5</text:span></text:span><text:span text:style-name="Strong_20_Emphasis">.3. Criptarea comunicării</text:span></text:h>
      <text:list text:style-name="L10">
        <text:list-item>
          <text:p text:style-name="P31">toate comunicările sunt transmise exclusiv prin <text:span text:style-name="Strong_20_Emphasis"><text:span text:style-name="T13">HTTPS</text:span></text:span></text:p>
        </text:list-item>
        <text:list-item>
          <text:p text:style-name="P31">datele sensibile nu circulă niciodată în clar.</text:p>
        </text:list-item>
      </text:list>
      <text:h text:style-name="Heading_20_2" text:outline-level="2" text:is-list-header="true"><text:span text:style-name="Strong_20_Emphasis"><text:span text:style-name="T16">5</text:span></text:span><text:span text:style-name="Strong_20_Emphasis">.4. Protecții suplimentare</text:span></text:h>
      <text:list text:style-name="L11">
        <text:list-item>
          <text:p text:style-name="P32">rate limiting pe acțiuni economice (prevenire spam trade),</text:p>
        </text:list-item>
        <text:list-item>
          <text:p text:style-name="P32">validarea fiecărei acțiuni pe server (sanitizare input),</text:p>
        </text:list-item>
        <text:list-item>
          <text:p text:style-name="P32">protecție împotriva sincronizării neautorizate (ex: trimiterea de state manual modificate în Godot).</text:p>
        </text:list-item>
      </text:list>
      <text:h text:style-name="Heading_20_2" text:outline-level="2" text:is-list-header="true"><text:span text:style-name="Strong_20_Emphasis"><text:span text:style-name="T16">5</text:span></text:span><text:span text:style-name="Strong_20_Emphasis">.5. Integritate </text:span></text:h>
      <text:p text:style-name="Text_20_body">Toate tranzacțiile sunt logate în baza de date, cu timestamp-uri exacte.<text:line-break/>Acest lucru permite auditarea completă a jocului și prevenirea fraudelor intenționate.</text:p>
      <text:h text:style-name="P33" text:outline-level="1"><text:span text:style-name="T17">6</text:span><text:span text:style-name="T18">. Cerințe de scalabilitate</text:span></text:h>
      <text:h text:style-name="Heading_20_2" text:outline-level="2"><text:span text:style-name="Strong_20_Emphasis"><text:span text:style-name="T16">6</text:span></text:span><text:span text:style-name="Strong_20_Emphasis">.1. Scalabilitate verticală</text:span></text:h>
      <text:p text:style-name="Text_20_body">Sistemul trebuie să poată rula în condiții optime pe o singură instanță de server:</text:p>
      <text:list text:style-name="L12">
        <text:list-item>
          <text:p text:style-name="P34">CPU multicore,</text:p>
        </text:list-item>
        <text:list-item>
          <text:p text:style-name="P34">memorie minimă 4–8 GB.</text:p>
        </text:list-item>
      </text:list>
      <text:h text:style-name="Heading_20_2" text:outline-level="2" text:is-list-header="true"><text:span text:style-name="Strong_20_Emphasis"><text:span text:style-name="T16">6</text:span></text:span><text:span text:style-name="Strong_20_Emphasis">.2. Scalabilitate orizontală (potențială)</text:span></text:h>
      <text:p text:style-name="Text_20_body">Arhitectura Node.js permite, dacă devine necesar:</text:p>
      <text:list text:style-name="L13">
        <text:list-item>
          <text:p text:style-name="P35">clustering (Node.js Cluster Module),</text:p>
        </text:list-item>
        <text:list-item>
          <text:p text:style-name="P35">load balancing,</text:p>
        </text:list-item>
        <text:list-item>
          <text:p text:style-name="P35">separarea serviciilor (economy engine, trade service, matchmaking).</text:p>
        </text:list-item>
      </text:list>
      <text:h text:style-name="Heading_20_2" text:outline-level="2" text:is-list-header="true"><text:span text:style-name="Strong_20_Emphasis"><text:span text:style-name="T16">6</text:span></text:span><text:span text:style-name="Strong_20_Emphasis">.3. Scalabilitatea bazei de date</text:span></text:h>
      <text:p text:style-name="Text_20_body">PostgreSQL oferă:</text:p>
      <text:list text:style-name="L14">
        <text:list-item>
          <text:p text:style-name="P36">indexing,</text:p>
        </text:list-item>
        <text:list-item>
          <text:p text:style-name="P36">query optimizat,</text:p>
        </text:list-item>
        <text:list-item>
          <text:p text:style-name="P36">replicare la nivel citire/scriere</text:p>
        </text:list-item>
        <text:list-item>
          <text:p text:style-name="P36"><text:soft-page-break/>tranzacții ACID pentru consistență economică.</text:p>
        </text:list-item>
      </text:list>
      <text:h text:style-name="Heading_20_2" text:outline-level="2" text:is-list-header="true"><text:span text:style-name="Strong_20_Emphasis"><text:span text:style-name="T16">6</text:span></text:span><text:span text:style-name="Strong_20_Emphasis">.4. Scalabilitatea numărului de jucători</text:span></text:h>
      <text:p text:style-name="Text_20_body">Sistemul trebuie să suporte:</text:p>
      <text:list text:style-name="L15">
        <text:list-item>
          <text:p text:style-name="P37"><text:span text:style-name="Strong_20_Emphasis"><text:span text:style-name="T13">minim 20–30 de jucători activi per sesiune</text:span></text:span><text:span text:style-name="T13">,</text:span></text:p>
        </text:list-item>
        <text:list-item>
          <text:p text:style-name="P37">conectări simultane la nivel global fără degradarea severă a performanțelor.</text:p>
        </text:list-item>
      </text:list>
      <text:h text:style-name="P25" text:outline-level="1"><text:span text:style-name="T16">7</text:span>. Cerințe de mentenabilitate</text:h>
      <text:h text:style-name="Heading_20_2" text:outline-level="2"><text:span text:style-name="Strong_20_Emphasis"><text:span text:style-name="T16">7</text:span></text:span><text:span text:style-name="Strong_20_Emphasis">.1. Cod modular</text:span></text:h>
      <text:p text:style-name="Text_20_body">Arhitectura trebuie să fie structurată pe module distincte:</text:p>
      <text:list text:style-name="L16">
        <text:list-item>
          <text:p text:style-name="P38">Authentication Module,</text:p>
        </text:list-item>
        <text:list-item>
          <text:p text:style-name="P38">WebSocket Hub,</text:p>
        </text:list-item>
        <text:list-item>
          <text:p text:style-name="P38">Trade Engine,</text:p>
        </text:list-item>
        <text:list-item>
          <text:p text:style-name="P38">Economy Engine,</text:p>
        </text:list-item>
        <text:list-item>
          <text:p text:style-name="P38">Bot Manager,</text:p>
        </text:list-item>
        <text:list-item>
          <text:p text:style-name="P38">Persistence Layer.</text:p>
        </text:list-item>
      </text:list>
      <text:p text:style-name="Text_20_body">Această structură facilitează izolarea bug-urilor și extinderea funcționalităților.</text:p>
      <text:h text:style-name="Heading_20_2" text:outline-level="2"><text:span text:style-name="Strong_20_Emphasis"><text:span text:style-name="T16">7</text:span></text:span><text:span text:style-name="Strong_20_Emphasis">.2. Respectarea principiilor de proiectare</text:span></text:h>
      <text:list text:style-name="L17">
        <text:list-item>
          <text:p text:style-name="P39">SOLID (în special responsabilitatea unică și separarea interfețelor),</text:p>
        </text:list-item>
        <text:list-item>
          <text:p text:style-name="P39">DI (Dependency Injection în backend),</text:p>
        </text:list-item>
        <text:list-item>
          <text:p text:style-name="P39">DRY (evitarea duplicării logicii economice).</text:p>
        </text:list-item>
      </text:list>
      <text:h text:style-name="Heading_20_2" text:outline-level="2" text:is-list-header="true"><text:span text:style-name="Strong_20_Emphasis"><text:span text:style-name="T16">7</text:span></text:span><text:span text:style-name="Strong_20_Emphasis">.3. Testare</text:span></text:h>
      <text:list text:style-name="L18">
        <text:list-item>
          <text:p text:style-name="P40">unit testing pentru componente critice (trade, inflație),</text:p>
        </text:list-item>
        <text:list-item>
          <text:p text:style-name="P40">testare de integrare între client și server,</text:p>
        </text:list-item>
        <text:list-item>
          <text:p text:style-name="P40">testare de performanță pentru WebSockets.</text:p>
        </text:list-item>
      </text:list>
      <text:h text:style-name="Heading_20_2" text:outline-level="2" text:is-list-header="true"><text:span text:style-name="Strong_20_Emphasis"><text:span text:style-name="T16">7</text:span></text:span><text:span text:style-name="Strong_20_Emphasis">.4. Documentație tehnică</text:span></text:h>
      <text:p text:style-name="Text_20_body">Codul sursă trebuie însoțit de:</text:p>
      <text:list text:style-name="L19">
        <text:list-item>
          <text:p text:style-name="P41">comentarii,</text:p>
        </text:list-item>
        <text:list-item>
          <text:p text:style-name="P41">README-uri per modul,</text:p>
        </text:list-item>
        <text:list-item>
          <text:p text:style-name="P41">diagrame arhitecturale (C4),</text:p>
        </text:list-item>
        <text:list-item>
          <text:p text:style-name="P41">ghid de instalare și configurare.</text:p>
        </text:list-item>
      </text:list>
      <text:h text:style-name="Heading_20_2" text:outline-level="2" text:is-list-header="true"><text:soft-page-break/><text:span text:style-name="Strong_20_Emphasis"><text:span text:style-name="T16">7</text:span></text:span><text:span text:style-name="Strong_20_Emphasis">.5. Ușurința actualizărilor</text:span></text:h>
      <text:p text:style-name="Text_20_body">Serverul trebuie proiectat astfel încât:</text:p>
      <text:list text:style-name="L20">
        <text:list-item>
          <text:p text:style-name="P42">actualizările să poată fi aplicate fără întreruperea sesiunilor active (rolling updates),</text:p>
        </text:list-item>
        <text:list-item>
          <text:p text:style-name="P42">schimbările în schema DB să fie gestionate prin migrații.</text:p>
        </text:list-item>
      </text:list>
      <text:h text:style-name="P25" text:outline-level="1"><text:span text:style-name="T19">8</text:span>. Platforme și browsere suportate</text:h>
      <text:h text:style-name="Heading_20_2" text:outline-level="2"><text:span text:style-name="Strong_20_Emphasis"><text:span text:style-name="T19">8</text:span></text:span><text:span text:style-name="Strong_20_Emphasis">.1. Platforme client</text:span></text:h>
      <text:p text:style-name="Text_20_body">Godot permite exportul pe:</text:p>
      <text:list text:style-name="L21">
        <text:list-item>
          <text:p text:style-name="P43">Windows,</text:p>
        </text:list-item>
        <text:list-item>
          <text:p text:style-name="P43">Linux,</text:p>
        </text:list-item>
        <text:list-item>
          <text:p text:style-name="P43">macOS.</text:p>
        </text:list-item>
      </text:list>
      <text:p text:style-name="Text_20_body">Cu efort <text:span text:style-name="T19">redus</text:span>, se pot suporta:</text:p>
      <text:list text:style-name="L22">
        <text:list-item>
          <text:p text:style-name="P44">Android,</text:p>
        </text:list-item>
        <text:list-item>
          <text:p text:style-name="P44">iOS.</text:p>
        </text:list-item>
      </text:list>
      <text:p text:style-name="Text_20_body">Pentru proiectul de licență platforma principală va fi <text:span text:style-name="Strong_20_Emphasis"><text:span text:style-name="T13">Windows.</text:span></text:span></text:p>
      <text:h text:style-name="Heading_20_2" text:outline-level="2" text:is-list-header="true"><text:span text:style-name="Strong_20_Emphasis"><text:span text:style-name="T19">8</text:span></text:span><text:span text:style-name="Strong_20_Emphasis">.2. Platforme server</text:span></text:h>
      <text:p text:style-name="Text_20_body">Backend-ul Node.js este compatibil cu:</text:p>
      <text:list text:style-name="L23">
        <text:list-item>
          <text:p text:style-name="P45">Linux,</text:p>
        </text:list-item>
        <text:list-item>
          <text:p text:style-name="P45">Windows Server,</text:p>
        </text:list-item>
        <text:list-item>
          <text:p text:style-name="P45">macOS (dezvoltare, nu producție).</text:p>
        </text:list-item>
      </text:list>
      <text:h text:style-name="Heading_20_2" text:outline-level="2" text:is-list-header="true"><text:span text:style-name="Strong_20_Emphasis"><text:span text:style-name="T19">8</text:span></text:span><text:span text:style-name="Strong_20_Emphasis">.4. Compatibilitate rețea</text:span></text:h>
      <text:p text:style-name="Text_20_body">Sistemul trebuie să funcționeze în:</text:p>
      <text:list text:style-name="L24">
        <text:list-item>
          <text:p text:style-name="P46">rețele LAN,</text:p>
        </text:list-item>
        <text:list-item>
          <text:p text:style-name="P46">conexiuni Wi-Fi cu latență medie,</text:p>
        </text:list-item>
        <text:list-item>
          <text:p text:style-name="P46">conexiuni mobile 4G/5G (depinde de stabilitatea WebSocke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1cm" style:auto-text-indent="false"/>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auto" fo:break-after="auto"/>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cm" fo:margin-bottom="0.499cm" style:contextual-spacing="false" style:page-number="auto"/>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3cm" style:contextual-spacing="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20pt" fo:font-weight="bold" style:font-size-asian="28pt" style:font-weight-asian="bold" style:font-size-complex="28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0T21:56:43.893112300</meta:creation-date>
    <dc:date>2026-01-20T20:51:07.685500000</dc:date>
    <meta:editing-duration>PT39M30S</meta:editing-duration>
    <meta:editing-cycles>13</meta:editing-cycles>
    <meta:generator>LibreOffice/25.8.4.2$Windows_X86_64 LibreOffice_project/290daaa01b999472f0c7a3890eb6a550fd74c6df</meta:generator>
    <meta:document-statistic meta:table-count="1" meta:image-count="0" meta:object-count="0" meta:page-count="6" meta:paragraph-count="179" meta:word-count="1202" meta:character-count="8325" meta:non-whitespace-character-count="7374"/>
  </office:meta>
</office:document-meta>
</file>