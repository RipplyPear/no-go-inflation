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Title">
      <style:text-properties officeooo:rsid="002fc7a8" officeooo:paragraph-rsid="002fc7a8"/>
    </style:style>
    <style:style style:name="P2" style:family="paragraph" style:parent-style-name="Heading_20_1">
      <style:paragraph-properties fo:margin-top="0cm" fo:margin-bottom="0.247cm" style:contextual-spacing="false" fo:line-height="115%" fo:text-align="justify" style:justify-single-word="false"/>
      <style:text-properties style:font-name="Times New Roman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319aba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text-properties officeooo:rsid="00319aba" officeooo:paragraph-rsid="00319aba"/>
    </style:style>
    <style:style style:name="P9" style:family="paragraph" style:parent-style-name="Text_20_body" style:list-style-name="L5"/>
    <style:style style:name="P10" style:family="paragraph" style:parent-style-name="Heading_20_1">
      <style:paragraph-properties fo:margin-top="0cm" fo:margin-bottom="0.247cm" style:contextual-spacing="false" fo:line-height="115%" fo:text-align="justify" style:justify-single-word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9aba" style:font-weight-asian="normal" style:font-weight-complex="normal"/>
    </style:style>
    <style:style style:name="T3" style:family="text">
      <style:text-properties officeooo:rsid="00319aba"/>
    </style:style>
    <style:style style:name="T4" style:family="text">
      <style:text-properties style:font-name="Times New Roman1"/>
    </style:style>
    <style:style style:name="T5" style:family="text">
      <style:text-properties officeooo:rsid="0033cde0"/>
    </style:style>
    <style:style style:name="T6" style:family="text">
      <style:text-properties fo:font-weight="bold" officeooo:rsid="0033cde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gerea stack-ului tehnologic</text:p>
      <text:h text:style-name="P2" text:outline-level="1"/>
      <text:h text:style-name="P2" text:outline-level="1">1. Tehnologia pentru frontend</text:h>
      <text:h text:style-name="Heading_20_2" text:outline-level="2"><text:span text:style-name="Strong_20_Emphasis">1.1. Godot Engine 4</text:span></text:h>
      <text:p text:style-name="Text_20_body">Frontend-ul jocului este dezvoltat utilizând <text:span text:style-name="Strong_20_Emphasis"><text:span text:style-name="T1">Godot 4.</text:span></text:span><text:span text:style-name="Strong_20_Emphasis"><text:span text:style-name="T2">5</text:span></text:span>, un motor de joc open-source, modern și performant. Alegerea Godot este justificată de următoarele aspecte:</text:p>
      <text:list text:style-name="L1">
        <text:list-item>
          <text:p text:style-name="P3">suport excelent pentru jocuri 2D,</text:p>
        </text:list-item>
        <text:list-item>
          <text:p text:style-name="P3">integrare nativă cu WebSockets și WebRTC,</text:p>
        </text:list-item>
        <text:list-item>
          <text:p text:style-name="P3">arhitectură Node-Scene foarte accesibilă pentru prototipare rapidă,</text:p>
        </text:list-item>
        <text:list-item>
          <text:p text:style-name="P3">editor vizual intuitiv,</text:p>
        </text:list-item>
        <text:list-item>
          <text:p text:style-name="P3">performanță ridicată pe sisteme modeste,</text:p>
        </text:list-item>
        <text:list-item>
          <text:p text:style-name="P4">licență permis<text:span text:style-name="T3">ivă</text:span> (MIT), fără costuri sau restricții</text:p>
        </text:list-item>
        <text:list-item>
          <text:p text:style-name="P4">permite exportul multiplatformă (Windows, Linux, macOS și Android).</text:p>
        </text:list-item>
      </text:list>
      <text:h text:style-name="P2" text:outline-level="1">2. Tehnologia pentru backend</text:h>
      <text:h text:style-name="Heading_20_2" text:outline-level="2"><text:span text:style-name="Strong_20_Emphasis">2.1. Node.js + TypeScript</text:span></text:h>
      <text:p text:style-name="Text_20_body">Backend-ul este implementat în <text:span text:style-name="Strong_20_Emphasis"><text:span text:style-name="T1">Node.js</text:span></text:span><text:span text:style-name="T1"> cu </text:span><text:span text:style-name="Strong_20_Emphasis"><text:span text:style-name="T1">TypeScript</text:span></text:span>, pentru a beneficia de:</text:p>
      <text:list text:style-name="L2">
        <text:list-item>
          <text:p text:style-name="P5">modelul asincron event-driven potrivit pentru aplicații realtime,</text:p>
        </text:list-item>
        <text:list-item>
          <text:p text:style-name="P5">latență redusă în gestionarea conexiunilor WebSocket,</text:p>
        </text:list-item>
        <text:list-item>
          <text:p text:style-name="P5">ecosistem matur (biblioteci, framework-uri, tooling),</text:p>
        </text:list-item>
        <text:list-item>
          <text:p text:style-name="P5">tipare stricte prin TypeScript pentru reducerea erorilor,</text:p>
        </text:list-item>
        <text:list-item>
          <text:p text:style-name="P5">scalare facilă (clustering, load balancing),</text:p>
        </text:list-item>
        <text:list-item>
          <text:p text:style-name="P5">integrare eficientă cu WebSockets (ws, uWebSockets),</text:p>
        </text:list-item>
        <text:list-item>
          <text:p text:style-name="P5">performanță excelentă pentru protocoale low-latency.</text:p>
        </text:list-item>
      </text:list>
      <text:p text:style-name="Text_20_body">Această combinație este una dintre cele mai <text:span text:style-name="T3">potrivite</text:span> opțiuni pentru aplicații multiplayer.</text:p>
      <text:h text:style-name="P2" text:outline-level="1">3. Tehnologia pentru stocarea datelor</text:h>
      <text:h text:style-name="Heading_20_2" text:outline-level="2"><text:span text:style-name="Strong_20_Emphasis">3.1. PostgreSQL</text:span></text:h>
      <text:p text:style-name="Text_20_body">Baza de date utilizată este <text:span text:style-name="Strong_20_Emphasis"><text:span text:style-name="T1">PostgreSQL</text:span></text:span>, aleasă pentru:</text:p>
      <text:list text:style-name="L3">
        <text:list-item>
          <text:p text:style-name="P6">suport complet ACID, critic pentru tranzacții economice,</text:p>
        </text:list-item>
        <text:list-item>
          <text:p text:style-name="P6">suport nativ pentru JSONB (util pentru stocarea flexibilă a stărilor de joc),</text:p>
        </text:list-item>
        <text:list-item>
          <text:p text:style-name="P6"><text:soft-page-break/>performanță ridicată la citire/scriere,</text:p>
        </text:list-item>
        <text:list-item>
          <text:p text:style-name="P6">mecanisme avansate de indexing,</text:p>
        </text:list-item>
        <text:list-item>
          <text:p text:style-name="P6">stabilitate și scalabilitate,</text:p>
        </text:list-item>
        <text:list-item>
          <text:p text:style-name="P6">compatibilitate excelentă cu ORM-uri TypeScript.</text:p>
        </text:list-item>
      </text:list>
      <text:p text:style-name="Text_20_body">Pentru un proiect care manipulează resurse, tranzacții și indicatori economici, PostgreSQL reprezintă o bază robustă și matură.</text:p>
      <text:h text:style-name="P2" text:outline-level="1">4. Limbajul și framework-ul principal de programare</text:h>
      <text:h text:style-name="Heading_20_2" text:outline-level="2"><text:span text:style-name="Strong_20_Emphasis">4.1. GDScript (frontend)</text:span></text:h>
      <text:p text:style-name="Text_20_body">GDScript este limbajul principal pentru partea de client, datorită:</text:p>
      <text:list text:style-name="L4">
        <text:list-item>
          <text:p text:style-name="P7">integrării native în Godot,</text:p>
        </text:list-item>
        <text:list-item>
          <text:p text:style-name="P7">sintaxei ușor de învățat,</text:p>
        </text:list-item>
        <text:list-item>
          <text:p text:style-name="P7">interoperabilității directe cu engine-ul,</text:p>
        </text:list-item>
        <text:list-item>
          <text:p text:style-name="P8">lipsa „boilerplate”-ului</text:p>
        </text:list-item>
        <text:list-item>
          <text:p text:style-name="P7">performanței bune pentru logică de joc 2D.</text:p>
        </text:list-item>
      </text:list>
      <text:h text:style-name="Heading_20_2" text:outline-level="2" text:is-list-header="true"><text:span text:style-name="Strong_20_Emphasis">4.2. TypeScript (backend)</text:span></text:h>
      <text:p text:style-name="Text_20_body">TypeScript este limbajul principal pentru logică server-side:</text:p>
      <text:list text:style-name="L5">
        <text:list-item>
          <text:p text:style-name="P9">tipare statice → cod mai sigur,</text:p>
        </text:list-item>
        <text:list-item>
          <text:p text:style-name="P9">debugging mai eficient,</text:p>
        </text:list-item>
        <text:list-item>
          <text:p text:style-name="P9">integrare cu Node.js,</text:p>
        </text:list-item>
        <text:list-item>
          <text:p text:style-name="P9">suport excelent pentru WebSockets și REST.</text:p>
        </text:list-item>
      </text:list>
      <text:h text:style-name="P10" text:outline-level="1"><text:span text:style-name="T4">5. Librării și tehnologii utilizate în cadrul proiectului</text:span></text:h>
      <text:h text:style-name="Heading_20_2" text:outline-level="2"><text:span text:style-name="Strong_20_Emphasis"><text:span text:style-name="T3">5.1. </text:span></text:span><text:span text:style-name="Strong_20_Emphasis">Frontend</text:span></text:h>
      <text:list text:style-name="L6">
        <text:list-item>
          <text:p text:style-name="P11">Godot WebSocket Client (modul nativ)</text:p>
        </text:list-item>
        <text:list-item>
          <text:p text:style-name="P11">Godot Animation System</text:p>
        </text:list-item>
        <text:list-item>
          <text:p text:style-name="P11">Godot UI Controls (GraphEdit, Containers, Panels)</text:p>
        </text:list-item>
        <text:list-item>
          <text:p text:style-name="P11">GDScript Signal System (pentru event-driven gameplay)</text:p>
        </text:list-item>
      </text:list>
      <text:h text:style-name="Heading_20_2" text:outline-level="2" text:is-list-header="true"><text:span text:style-name="Strong_20_Emphasis"><text:span text:style-name="T3">5.2. </text:span></text:span><text:span text:style-name="Strong_20_Emphasis">Backend</text:span></text:h>
      <text:list text:style-name="L7">
        <text:list-item>
          <text:p text:style-name="P12"><text:span text:style-name="Strong_20_Emphasis"><text:span text:style-name="T1">ws</text:span></text:span><text:span text:style-name="T1"> (WebSocket server)</text:span></text:p>
        </text:list-item>
        <text:list-item>
          <text:p text:style-name="P12"><text:soft-page-break/><text:span text:style-name="Strong_20_Emphasis"><text:span text:style-name="T1">Express.js</text:span></text:span><text:span text:style-name="T1"> (endpointuri REST)</text:span></text:p>
        </text:list-item>
        <text:list-item>
          <text:p text:style-name="P12"><text:span text:style-name="Strong_20_Emphasis"><text:span text:style-name="T1">Prisma</text:span></text:span><text:span text:style-name="T1"> (ORM pentru PostgreSQL)</text:span></text:p>
        </text:list-item>
        <text:list-item>
          <text:p text:style-name="P12"><text:span text:style-name="Strong_20_Emphasis"><text:span text:style-name="T1">jsonwebtoken</text:span></text:span><text:span text:style-name="T1"> (autentificare JWT)</text:span></text:p>
        </text:list-item>
        <text:list-item>
          <text:p text:style-name="P12"><text:span text:style-name="Strong_20_Emphasis"><text:span text:style-name="T1">bcrypt</text:span></text:span><text:span text:style-name="T1"> (hashing parole)</text:span></text:p>
        </text:list-item>
        <text:list-item>
          <text:p text:style-name="P12"><text:span text:style-name="Strong_20_Emphasis"><text:span text:style-name="T1">Node.js Cluster Mode</text:span></text:span><text:span text:style-name="T1"> (scalare orizontală posibilă)</text:span></text:p>
        </text:list-item>
        <text:list-item>
          <text:p text:style-name="P12"><text:span text:style-name="Strong_20_Emphasis"><text:span text:style-name="T1">Zod / class-validator</text:span></text:span><text:span text:style-name="T1"> (validare input)</text:span></text:p>
        </text:list-item>
      </text:list>
      <text:h text:style-name="Heading_20_2" text:outline-level="2" text:is-list-header="true"><text:span text:style-name="Strong_20_Emphasis"><text:span text:style-name="T5">5.3. </text:span></text:span><text:span text:style-name="Strong_20_Emphasis">Tooling și utilitare</text:span></text:h>
      <text:list text:style-name="L8">
        <text:list-item>
          <text:p text:style-name="P13">Docker (containerizare DB și backend)</text:p>
        </text:list-item>
        <text:list-item>
          <text:p text:style-name="P13">pgAdmin (administrare DB)</text:p>
        </text:list-item>
        <text:list-item>
          <text:p text:style-name="P13">ESLint + Prettier (calitatea codului)</text:p>
        </text:list-item>
        <text:list-item>
          <text:p text:style-name="P13">Git + GitHub (control versiuni)</text:p>
        </text:list-item>
      </text:list>
      <text:h text:style-name="P2" text:outline-level="1">6. Tool-uri de development (IDE)</text:h>
      <text:h text:style-name="Heading_20_2" text:outline-level="2"><text:span text:style-name="Strong_20_Emphasis"><text:span text:style-name="T5">6.1. </text:span></text:span><text:span text:style-name="Strong_20_Emphasis">Frontend (Godot):</text:span></text:h>
      <text:list text:style-name="L9">
        <text:list-item>
          <text:p text:style-name="P14">Godot Editor 4.<text:span text:style-name="T5">5</text:span> (instrument dedicat pentru dezvoltarea și testarea scenelor, scripturilor și interfețelor)</text:p>
        </text:list-item>
      </text:list>
      <text:h text:style-name="Heading_20_2" text:outline-level="2" text:is-list-header="true"><text:span text:style-name="Strong_20_Emphasis"><text:span text:style-name="T5">6.2. </text:span></text:span><text:span text:style-name="Strong_20_Emphasis">Backend (Node/TypeScript):</text:span></text:h>
      <text:list text:style-name="L10">
        <text:list-item>
          <text:p text:style-name="P15">Visual Studio Code</text:p>
        </text:list-item>
        <text:list-item>
          <text:p text:style-name="P15">WebStorm <text:span text:style-name="T5">(</text:span><text:span text:style-name="T6">posibil</text:span><text:span text:style-name="T5">)</text:span></text:p>
        </text:list-item>
        <text:list-item>
          <text:p text:style-name="P15">extensii: ESLint, Prettier, GitLens, TypeScript Hero</text:p>
        </text:list-item>
      </text:list>
      <text:h text:style-name="Heading_20_2" text:outline-level="2" text:is-list-header="true"><text:span text:style-name="Strong_20_Emphasis"><text:span text:style-name="T5">6.3. </text:span></text:span><text:span text:style-name="Strong_20_Emphasis">Bază de date:</text:span></text:h>
      <text:list text:style-name="L11">
        <text:list-item>
          <text:p text:style-name="P16">pgAdmin 4</text:p>
        </text:list-item>
        <text:list-item>
          <text:p text:style-name="P16">DBeaver</text:p>
        </text:list-item>
      </text:list>
      <text:h text:style-name="P2" text:outline-level="1">7. Justificarea alegerii tehnologiilor în detrimentul alternativelor</text:h>
      <text:h text:style-name="Heading_20_2" text:outline-level="2"><text:span text:style-name="Strong_20_Emphasis">7.1. Godot vs. Unity / Unreal</text:span></text:h>
      <text:list text:style-name="L12">
        <text:list-item>
          <text:p text:style-name="P17">Godot este optim pentru 2D.</text:p>
        </text:list-item>
        <text:list-item>
          <text:p text:style-name="P17">Fără costuri, fără licențe suplimentare.</text:p>
        </text:list-item>
        <text:list-item>
          <text:p text:style-name="P17">Build rapid, editor foarte ușor de folosit.</text:p>
        </text:list-item>
        <text:list-item>
          <text:p text:style-name="P17">Integrare WebSocket directă și simplă.</text:p>
        </text:list-item>
      </text:list>
      <text:h text:style-name="Heading_20_2" text:outline-level="2" text:is-list-header="true"><text:soft-page-break/><text:span text:style-name="Strong_20_Emphasis">7.2. Node.js + TypeScript vs. .NET Core</text:span></text:h>
      <text:p text:style-name="Text_20_body">.NET Core este robust, dar:</text:p>
      <text:list text:style-name="L13">
        <text:list-item>
          <text:p text:style-name="P18">are overhead mai mare pentru scenarii realtime,</text:p>
        </text:list-item>
        <text:list-item>
          <text:p text:style-name="P18">ecosistem WebSocket mai complex,</text:p>
        </text:list-item>
        <text:list-item>
          <text:p text:style-name="P18">timpul de prototipare este mai mare,</text:p>
        </text:list-item>
        <text:list-item>
          <text:p text:style-name="P18">hosting-ul este mai scump.</text:p>
        </text:list-item>
      </text:list>
      <text:p text:style-name="Text_20_body">Node.js este nativ orientat spre conexiuni simultane și mesaje dese, <text:span text:style-name="T5">foarte potrivit </text:span>pentru un joc multiplayer.</text:p>
      <text:h text:style-name="Heading_20_2" text:outline-level="2"><text:span text:style-name="Strong_20_Emphasis">7.3. PostgreSQL vs. MySQL / MongoDB</text:span></text:h>
      <text:list text:style-name="L14">
        <text:list-item>
          <text:p text:style-name="P19">tranzacții economice → necesită ACID,</text:p>
        </text:list-item>
        <text:list-item>
          <text:p text:style-name="P19">structuri complexe → în PostgreSQL <text:span text:style-name="T5">permite</text:span> <text:span text:style-name="T5">combinarea</text:span> relațional + JSON,</text:p>
        </text:list-item>
        <text:list-item>
          <text:p text:style-name="P19">performanță consistentă și foarte bună,</text:p>
        </text:list-item>
        <text:list-item>
          <text:p text:style-name="P19">suport avansat pentru locking și indexing.</text:p>
        </text:list-item>
      </text:list>
      <text:p text:style-name="Text_20_body">MongoDB nu este potrivit pentru tranzacții economice consistente.<text:line-break/>MySQL este limitat în JSON și indexing avansat.</text:p>
      <text:h text:style-name="Heading_20_2" text:outline-level="2"><text:span text:style-name="Strong_20_Emphasis">7.4. TypeScript vs. JavaScript</text:span></text:h>
      <text:list text:style-name="L15">
        <text:list-item>
          <text:p text:style-name="P20">control strict al tipurilor,</text:p>
        </text:list-item>
        <text:list-item>
          <text:p text:style-name="P20">prevenirea bug-urilor,</text:p>
        </text:list-item>
        <text:list-item>
          <text:p text:style-name="P20">stabilitate în aplicații complexe,</text:p>
        </text:list-item>
        <text:list-item>
          <text:p text:style-name="P20">documentare mai clară a modelelor și entitățil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text-indent="1cm" style:auto-text-indent="false"/>
      <style:text-properties style:font-name="Times New Roman1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auto" fo:break-after="auto"/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.499cm" style:contextual-spacing="false" style:page-number="auto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3cm" style:contextual-spacing="false"/>
      <style:text-properties style:font-name="Times New Roman" fo:font-family="'Times New Roman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" fo:font-family="'Times New Roman'" style:font-style-name="Bold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21:56:43.893112300</meta:creation-date>
    <dc:date>2025-12-14T00:55:53.116568300</dc:date>
    <meta:editing-duration>PT49M54S</meta:editing-duration>
    <meta:editing-cycles>17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99" meta:word-count="623" meta:character-count="4240" meta:non-whitespace-character-count="3782"/>
  </office:meta>
</office:document-meta>
</file>